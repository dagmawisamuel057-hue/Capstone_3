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P3" style:parent-style-name="Normal" style:list-style-name="LFO2" style:family="paragraph"/>
    <style:style style:name="P4" style:parent-style-name="Normal" style:list-style-name="LFO3" style:family="paragraph"/>
  </office:automatic-styles>
  <office:body>
    <office:text text:use-soft-page-breaks="true">
      <text:p text:style-name="P1">Week 9 Power BI Lab Answers</text:p>
      <text:p text:style-name="Normal">Exercise 1.B – Customer Profitability Sample</text:p>
      <text:list text:style-name="LFO1" text:continue-numbering="true">
        <text:list-item>
          <text:p text:style-name="P2">What happened when you clicked a state on the map?</text:p>
        </text:list-item>
      </text:list>
      <text:p text:style-name="Normal">The report automatically filtered all visuals to show data for the selected state. This helped me focus on specific regional performance.</text:p>
      <text:list text:style-name="LFO2" text:continue-numbering="true">
        <text:list-item>
          <text:p text:style-name="P3">What happened when you clicked a region in the tree map?</text:p>
        </text:list-item>
      </text:list>
      <text:p text:style-name="Normal">The dashboard updated all charts and KPIs to display information only for the selected region.</text:p>
      <text:list text:style-name="LFO3" text:continue-numbering="true">
        <text:list-item>
          <text:p text:style-name="P4">What happened when you selected a sales representative from the slicer?</text:p>
        </text:list-item>
      </text:list>
      <text:p text:style-name="Normal">The report filtered to show only the performance metrics, revenue, and trends associated with that specific sales representativ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gmawi mulugeta</meta:initial-creator>
    <dc:creator>dagmawi mulugeta</dc:creator>
    <meta:creation-date>2026-06-02T18:40:00Z</meta:creation-date>
    <dc:date>2026-06-02T18:41:00Z</dc:date>
    <meta:template xlink:href="Normal" xlink:type="simple"/>
    <meta:editing-cycles>1</meta:editing-cycles>
    <meta:editing-duration>PT60S</meta:editing-duration>
    <meta:document-statistic meta:page-count="1" meta:paragraph-count="8" meta:word-count="100" meta:character-count="617" meta:row-count="11" meta:non-whitespace-character-count="524"/>
  </office:meta>
</office:document-meta>
</file>